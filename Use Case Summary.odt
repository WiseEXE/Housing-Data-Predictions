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d905" officeooo:paragraph-rsid="000fd905"/>
    </style:style>
    <style:style style:name="P2" style:family="paragraph" style:parent-style-name="Standard">
      <style:paragraph-properties fo:text-align="center" style:justify-single-word="false"/>
      <style:text-properties officeooo:rsid="000fd905" officeooo:paragraph-rsid="000fd905"/>
    </style:style>
    <style:style style:name="P3" style:family="paragraph" style:parent-style-name="Standard">
      <style:paragraph-properties fo:text-align="left" style:justify-single-word="false"/>
      <style:text-properties officeooo:rsid="000fd905" officeooo:paragraph-rsid="000fd905"/>
    </style:style>
    <style:style style:name="P4" style:family="paragraph" style:parent-style-name="Heading_20_3">
      <style:paragraph-properties fo:text-align="left" style:justify-single-word="false"/>
      <style:text-properties fo:font-weight="bold" officeooo:rsid="000fd905" officeooo:paragraph-rsid="000fd905"/>
    </style:style>
    <style:style style:name="P5" style:family="paragraph" style:parent-style-name="Text_20_body" style:list-style-name="L1">
      <style:text-properties officeooo:rsid="000fd905"/>
    </style:style>
    <style:style style:name="P6" style:family="paragraph" style:parent-style-name="Text_20_body" style:list-style-name="L1"/>
    <style:style style:name="T1" style:family="text">
      <style:text-properties fo:font-weight="bold"/>
    </style:style>
    <style:style style:name="T2" style:family="text">
      <style:text-properties style:font-name="Liberation Serif" fo:font-weight="bold" style:font-weight-asian="bold" style:font-weight-complex="bold"/>
    </style:style>
    <style:style style:name="T3" style:family="text">
      <style:text-properties fo:font-weight="bold" officeooo:rsid="000fd905"/>
    </style:style>
    <style:style style:name="T4" style:family="text">
      <style:text-properties officeooo:rsid="000fd905"/>
    </style:style>
    <style:style style:name="T5" style:family="text">
      <style:text-properties style:font-name="Liberation Serif" fo:font-weight="bold" officeooo:rsid="000fd905"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rl Wise</text:p>
      <text:p text:style-name="P1">Jaime Ruiz<text:line-break/>Data Science</text:p>
      <text:p text:style-name="P1">05/18/2025</text:p>
      <text:p text:style-name="P1"/>
      <text:p text:style-name="P2">Housing Data Predictions Use Case Summary</text:p>
      <text:p text:style-name="P2"/>
      <text:p text:style-name="P3"/>
      <text:p text:style-name="P3"/>
      <text:h text:style-name="P4" text:outline-level="3">Project Summary: Real Estate Predictive Valuation System</text:h>
      <text:list text:style-name="L1">
        <text:list-item>
          <text:p text:style-name="P5"><text:span text:style-name="T1">Objective:</text:span> Built an automated system to estimate residential property values by comparing three different machine learning models (OLS, KNN, and MVLR) against historical sales data.</text:p>
        </text:list-item>
        <text:list-item>
          <text:p text:style-name="P5"><text:span text:style-name="T1">The Predictor Pipeline:</text:span> Created the <text:span text:style-name="Source_20_Text"><text:span text:style-name="T2">jaime_predictor</text:span></text:span> function to act as a "data factory"—it takes any new house listing, cleans it, and applies the exact same math used during training to ensure accurate results.</text:p>
        </text:list-item>
        <text:list-item>
          <text:p text:style-name="P6"><text:span text:style-name="T3">Feature Engineering:</text:span><text:span text:style-name="T4"> Improved the model's accuracy by calculating custom interaction terms, specifically multiplying </text:span><text:span text:style-name="Source_20_Text"><text:span text:style-name="T5">latitude</text:span></text:span><text:span text:style-name="T4"> and </text:span><text:span text:style-name="Source_20_Text"><text:span text:style-name="T5">longitude by square footage</text:span></text:span><text:span text:style-name="T4"> to better capture how location impacts value as a home gets larger.</text:span></text:p>
        </text:list-item>
        <text:list-item>
          <text:p text:style-name="P5"><text:span text:style-name="T1">Data Normalization:</text:span> Built a scaling process that uses the training dataset’s global mean and standard deviation, ensuring that every new test house is measured against the same standards as the homes in the original data.</text:p>
        </text:list-item>
        <text:list-item>
          <text:p text:style-name="P5"><text:span text:style-name="T1">Comparative Analysis:</text:span> The system doesn't just give one price; it provides three different predictions, allowing us to see how different algorithms interpret the market and identify which one is most reliable.</text:p>
        </text:list-item>
        <text:list-item>
          <text:p text:style-name="P5"><text:span text:style-name="T1">Diagnostic Validation:</text:span> By automatically comparing the model's output to the "Actual Price" of the house, the tool serves as a reality check, highlighting exactly where the model is succeeding and where it struggles with luxury market outliers.</text:p>
        </text:list-item>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8T23:29:22.926276300</meta:creation-date>
    <dc:date>2026-05-18T23:31:48.782161100</dc:date>
    <meta:editing-duration>PT2M27S</meta:editing-duration>
    <meta:editing-cycles>1</meta:editing-cycles>
    <meta:document-statistic meta:table-count="0" meta:image-count="0" meta:object-count="0" meta:page-count="1" meta:paragraph-count="11" meta:word-count="219" meta:character-count="1434" meta:non-whitespace-character-count="1233"/>
    <meta:generator>LibreOffice/26.2.2.2$Windows_X86_64 LibreOffice_project/1f77d10d6938fd34972958f64b2bcfa54f8b1ba5</meta:generator>
  </office:meta>
</office:document-meta>
</file>